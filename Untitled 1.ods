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18">
          <table:table-cell table:number-columns-repeated="8"/>
        </table:table-row>
        <table:table-row table:style-name="ro1">
          <table:table-cell table:number-columns-repeated="6"/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table:number-columns-repeated="6"/>
          <table:table-cell table:formula="of:=[.G19]*0.18" office:value-type="float" office:value="269.82" calcext:value-type="float">
            <text:p>269.82</text:p>
          </table:table-cell>
          <table:table-cell table:formula="of:=[.G19]/1.18" office:value-type="float" office:value="1270.33898305085" calcext:value-type="float">
            <text:p>1270.33898305085</text:p>
          </table:table-cell>
        </table:table-row>
        <table:table-row table:style-name="ro1">
          <table:table-cell table:number-columns-repeated="7"/>
          <table:table-cell table:formula="of:=[.G19]-[.H20]" office:value-type="float" office:value="228.661016949153" calcext:value-type="float">
            <text:p>228.661016949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5T15:56:34.320797974</meta:creation-date>
    <dc:date>2026-07-05T16:46:08.012755820</dc:date>
    <meta:editing-duration>PT39M23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